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A">
        <table:table-column/>
        <table:table-column/>
        <table:table-row>
          <table:table-cell office:value="1" office:value-type="float"/>
          <table:table-cell office:value="2" office:value-type="float"/>
        </table:table-row>
        <table:table-row>
          <table:table-cell office:value="2" office:value-type="float"/>
          <table:table-cell office:value="1" office:value-type="float"/>
        </table:table-row>
      </table:table>
      <table:table table:name="b">
        <table:table-column/>
        <table:table-row>
          <table:table-cell office:value="4" office:value-type="float"/>
        </table:table-row>
        <table:table-row>
          <table:table-cell office:value="4" office:value-type="float"/>
        </table:table-row>
      </table:table>
      <table:table table:name="c">
        <table:table-column/>
        <table:table-column/>
        <table:table-row>
          <table:table-cell office:value="1" office:value-type="float"/>
          <table:table-cell office:value="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5-26T14:38:01.959181</meta:creation-date>
    <dc:date>2026-05-26T14:38:01.959391</dc:date>
    <meta:generator>http://pypi.python.org/pypi/ezodf/0.1.0$Python3.10.11 (v3.10.11:7d4cc5aa85, Apr  4 2023, 19:05:19) [Clang 13.0.0 (clang-1300.0.29.30)]</meta:generator>
    <meta:document-statistic/>
    <meta:editing-cycles>1</meta:editing-cycles>
  </office:meta>
</office:document-meta>
</file>